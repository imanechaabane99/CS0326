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F0000011A5368D94B.png" manifest:media-type="image/png"/>
  <manifest:file-entry manifest:full-path="Pictures/100000010000034D000000A5548C0F29.png" manifest:media-type="image/png"/>
  <manifest:file-entry manifest:full-path="Pictures/100000010000029A0000010BC376F70A.png" manifest:media-type="image/png"/>
  <manifest:file-entry manifest:full-path="Pictures/10000001000004B60000020DB8C771E2.png" manifest:media-type="image/png"/>
  <manifest:file-entry manifest:full-path="Pictures/10000001000001EA0000004B031EE10A.png" manifest:media-type="image/png"/>
  <manifest:file-entry manifest:full-path="Pictures/100000010000040C000001BBEF9C8170.png" manifest:media-type="image/png"/>
  <manifest:file-entry manifest:full-path="Pictures/10000001000001680000007A3BEFA63B.png" manifest:media-type="image/png"/>
  <manifest:file-entry manifest:full-path="Pictures/10000001000002AB000000EB0D0CE2D6.png" manifest:media-type="image/png"/>
  <manifest:file-entry manifest:full-path="Pictures/100000010000027D0000023FADD72196.png" manifest:media-type="image/png"/>
  <manifest:file-entry manifest:full-path="Pictures/10000001000001010000007AF4276DE2.png" manifest:media-type="image/png"/>
  <manifest:file-entry manifest:full-path="Pictures/100000010000034D000000D0A36C275F.png" manifest:media-type="image/png"/>
  <manifest:file-entry manifest:full-path="Pictures/10000001000002B8000000D49B3DACA1.png" manifest:media-type="image/png"/>
  <manifest:file-entry manifest:full-path="Pictures/100000010000041F000000F272732CFE.png" manifest:media-type="image/png"/>
  <manifest:file-entry manifest:full-path="Pictures/10000001000002C700000148E8668F84.png" manifest:media-type="image/png"/>
  <manifest:file-entry manifest:full-path="Pictures/10000001000001D3000001B35DB05DAA.png" manifest:media-type="image/png"/>
  <manifest:file-entry manifest:full-path="Pictures/10000001000003810000015FF9378D88.png" manifest:media-type="image/png"/>
  <manifest:file-entry manifest:full-path="Pictures/100000010000039A000000BE77E9BDE0.png" manifest:media-type="image/png"/>
  <manifest:file-entry manifest:full-path="Pictures/1000000100000780000003FC272DEB79.png" manifest:media-type="image/png"/>
  <manifest:file-entry manifest:full-path="Pictures/100000010000033C000000F83BCA2A1C.png" manifest:media-type="image/png"/>
  <manifest:file-entry manifest:full-path="Pictures/1000000100000780000003FCBDA63954.png" manifest:media-type="image/png"/>
  <manifest:file-entry manifest:full-path="Pictures/10000001000005D90000016D41AAC42F.png" manifest:media-type="image/png"/>
  <manifest:file-entry manifest:full-path="Pictures/100000010000043F00000348A9B46482.png" manifest:media-type="image/png"/>
  <manifest:file-entry manifest:full-path="Pictures/1000000100000780000003FC8B51E2D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9.507cm" table:align="left" style:shadow="none" style:may-break-between-rows="true" table:border-model="collapsing"/>
    </style:style>
    <style:style style:name="Tabella1.A" style:family="table-column">
      <style:table-column-properties style:column-width="4.692cm"/>
    </style:style>
    <style:style style:name="Tabella1.B" style:family="table-column">
      <style:table-column-properties style:column-width="4.815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a1.B4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itle">
      <style:text-properties officeooo:rsid="001bff3f" officeooo:paragraph-rsid="001bff3f"/>
    </style:style>
    <style:style style:name="P2" style:family="paragraph" style:parent-style-name="Heading_20_1">
      <style:text-properties officeooo:rsid="001bff3f" officeooo:paragraph-rsid="001bff3f"/>
    </style:style>
    <style:style style:name="P3" style:family="paragraph" style:parent-style-name="Text_20_body">
      <style:text-properties officeooo:rsid="001bff3f" officeooo:paragraph-rsid="001bff3f"/>
    </style:style>
    <style:style style:name="P4" style:family="paragraph" style:parent-style-name="Text_20_body" style:list-style-name="L1">
      <style:text-properties officeooo:rsid="001bff3f" officeooo:paragraph-rsid="001bff3f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1bff3f" officeooo:paragraph-rsid="002de3f3"/>
    </style:style>
    <style:style style:name="P7" style:family="paragraph" style:parent-style-name="Text_20_body">
      <style:text-properties officeooo:rsid="001de9d3" officeooo:paragraph-rsid="002de3f3"/>
    </style:style>
    <style:style style:name="P8" style:family="paragraph" style:parent-style-name="Table_20_Contents">
      <style:paragraph-properties fo:text-align="lef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a0ab5" officeooo:paragraph-rsid="003a0a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a0ab5" officeooo:paragraph-rsid="003a0a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a0ab5" officeooo:paragraph-rsid="003a0a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Heading_20_1">
      <style:text-properties officeooo:rsid="001de9d3" officeooo:paragraph-rsid="002ca14c"/>
    </style:style>
    <style:style style:name="P13" style:family="paragraph" style:parent-style-name="Heading_20_2">
      <style:text-properties officeooo:rsid="002ca14c" officeooo:paragraph-rsid="002ca14c"/>
    </style:style>
    <style:style style:name="P14" style:family="paragraph" style:parent-style-name="Text_20_body">
      <style:text-properties officeooo:rsid="001fda08" officeooo:paragraph-rsid="0026701a"/>
    </style:style>
    <style:style style:name="P15" style:family="paragraph" style:parent-style-name="Text_20_body">
      <style:text-properties style:font-name="Liberation Serif" officeooo:rsid="0022f52c" officeooo:paragraph-rsid="0022f52c"/>
    </style:style>
    <style:style style:name="P16" style:family="paragraph" style:parent-style-name="Text_20_body">
      <style:text-properties style:font-name="Liberation Serif" officeooo:rsid="0025b97e" officeooo:paragraph-rsid="0025b97e"/>
    </style:style>
    <style:style style:name="P17" style:family="paragraph" style:parent-style-name="Text_20_body">
      <style:text-properties style:font-name="Liberation Serif" officeooo:rsid="0026701a" officeooo:paragraph-rsid="0026701a"/>
    </style:style>
    <style:style style:name="P18" style:family="paragraph" style:parent-style-name="Text_20_body">
      <style:text-properties style:font-name="Liberation Serif" officeooo:rsid="0022f52c" officeooo:paragraph-rsid="00276aae"/>
    </style:style>
    <style:style style:name="P19" style:family="paragraph" style:parent-style-name="Text_20_body">
      <style:text-properties officeooo:rsid="0022f52c" officeooo:paragraph-rsid="00276aae"/>
    </style:style>
    <style:style style:name="P20" style:family="paragraph" style:parent-style-name="Text_20_body">
      <style:text-properties officeooo:rsid="00276aae" officeooo:paragraph-rsid="002de3f3"/>
    </style:style>
    <style:style style:name="P21" style:family="paragraph" style:parent-style-name="Text_20_body">
      <style:text-properties officeooo:rsid="00276aae" officeooo:paragraph-rsid="00276aae"/>
    </style:style>
    <style:style style:name="P22" style:family="paragraph" style:parent-style-name="Text_20_body">
      <style:text-properties officeooo:rsid="001de9d3" officeooo:paragraph-rsid="00276aae"/>
    </style:style>
    <style:style style:name="P23" style:family="paragraph" style:parent-style-name="Text_20_body">
      <style:text-properties officeooo:rsid="00283c9f" officeooo:paragraph-rsid="00283c9f"/>
    </style:style>
    <style:style style:name="P24" style:family="paragraph" style:parent-style-name="Text_20_body">
      <style:text-properties officeooo:rsid="002aaebf" officeooo:paragraph-rsid="002aaebf"/>
    </style:style>
    <style:style style:name="P25" style:family="paragraph" style:parent-style-name="Text_20_body">
      <style:text-properties officeooo:rsid="002aaebf" officeooo:paragraph-rsid="002c2ce1"/>
    </style:style>
    <style:style style:name="P26" style:family="paragraph" style:parent-style-name="Heading_20_2">
      <style:text-properties officeooo:rsid="002de3f3" officeooo:paragraph-rsid="002de3f3"/>
    </style:style>
    <style:style style:name="P27" style:family="paragraph" style:parent-style-name="Text_20_body">
      <style:text-properties officeooo:rsid="002de3f3" officeooo:paragraph-rsid="002de3f3"/>
    </style:style>
    <style:style style:name="P28" style:family="paragraph" style:parent-style-name="Text_20_body">
      <style:text-properties officeooo:rsid="002e062b" officeooo:paragraph-rsid="002e7f75"/>
    </style:style>
    <style:style style:name="P29" style:family="paragraph" style:parent-style-name="Text_20_body">
      <style:text-properties officeooo:rsid="002f5358" officeooo:paragraph-rsid="002f5358"/>
    </style:style>
    <style:style style:name="P30" style:family="paragraph" style:parent-style-name="Text_20_body">
      <style:text-properties officeooo:rsid="002f9455" officeooo:paragraph-rsid="002f9455"/>
    </style:style>
    <style:style style:name="P31" style:family="paragraph" style:parent-style-name="Text_20_body" style:list-style-name="L2">
      <style:text-properties officeooo:rsid="002f9455" officeooo:paragraph-rsid="002f9455"/>
    </style:style>
    <style:style style:name="P32" style:family="paragraph" style:parent-style-name="Text_20_body" style:list-style-name="L2">
      <style:text-properties officeooo:paragraph-rsid="0030819a"/>
    </style:style>
    <style:style style:name="P33" style:family="paragraph" style:parent-style-name="Text_20_body">
      <style:paragraph-properties fo:text-align="left" style:justify-single-word="false"/>
      <style:text-properties officeooo:rsid="00343aab" officeooo:paragraph-rsid="003d84c8"/>
    </style:style>
    <style:style style:name="P34" style:family="paragraph" style:parent-style-name="Text_20_body" style:list-style-name="L2">
      <style:paragraph-properties fo:text-align="left" style:justify-single-word="false"/>
      <style:text-properties officeooo:rsid="003d84c8" officeooo:paragraph-rsid="003d84c8"/>
    </style:style>
    <style:style style:name="P35" style:family="paragraph" style:parent-style-name="Text_20_body">
      <style:paragraph-properties fo:text-align="left" style:justify-single-word="false"/>
      <style:text-properties officeooo:rsid="00343aab" officeooo:paragraph-rsid="00343aab"/>
    </style:style>
    <style:style style:name="P36" style:family="paragraph" style:parent-style-name="Text_20_body">
      <style:paragraph-properties fo:text-align="left" style:justify-single-word="false"/>
      <style:text-properties officeooo:rsid="00343aab" officeooo:paragraph-rsid="0035f48e"/>
    </style:style>
    <style:style style:name="P37" style:family="paragraph" style:parent-style-name="Text_20_body">
      <style:paragraph-properties fo:text-align="left" style:justify-single-word="false"/>
      <style:text-properties officeooo:rsid="003770cd" officeooo:paragraph-rsid="003770cd"/>
    </style:style>
    <style:style style:name="P38" style:family="paragraph" style:parent-style-name="Text_20_body">
      <style:paragraph-properties fo:text-align="left" style:justify-single-word="false"/>
      <style:text-properties officeooo:rsid="003770cd" officeooo:paragraph-rsid="003c62e7"/>
    </style:style>
    <style:style style:name="T1" style:family="text">
      <style:text-properties officeooo:rsid="001bff3f"/>
    </style:style>
    <style:style style:name="T2" style:family="text">
      <style:text-properties officeooo:rsid="001de9d3"/>
    </style:style>
    <style:style style:name="T3" style:family="text">
      <style:text-properties officeooo:rsid="002f9455"/>
    </style:style>
    <style:style style:name="T4" style:family="text">
      <style:text-properties officeooo:rsid="002de3f3"/>
    </style:style>
    <style:style style:name="T5" style:family="text">
      <style:text-properties officeooo:rsid="0026701a"/>
    </style:style>
    <style:style style:name="T6" style:family="text">
      <style:text-properties officeooo:rsid="001fda08"/>
    </style:style>
    <style:style style:name="T7" style:family="text">
      <style:text-properties fo:font-family="Consolas" style:font-family-generic="modern" style:font-pitch="fixed" officeooo:rsid="001fda08"/>
    </style:style>
    <style:style style:name="T8" style:family="text">
      <style:text-properties style:font-name="Liberation Serif" officeooo:rsid="001fda08"/>
    </style:style>
    <style:style style:name="T9" style:family="text">
      <style:text-properties style:font-name="Liberation Serif" officeooo:rsid="0026701a"/>
    </style:style>
    <style:style style:name="T10" style:family="text">
      <style:text-properties officeooo:rsid="003af541"/>
    </style:style>
    <style:style style:name="T11" style:family="text">
      <style:text-properties officeooo:rsid="0021097c"/>
    </style:style>
    <style:style style:name="T12" style:family="text">
      <style:text-properties officeooo:rsid="0023056e"/>
    </style:style>
    <style:style style:name="T13" style:family="text">
      <style:text-properties officeooo:rsid="00276aae"/>
    </style:style>
    <style:style style:name="T14" style:family="text">
      <style:text-properties style:font-name="Liberation Serif" officeooo:rsid="00276aae"/>
    </style:style>
    <style:style style:name="T15" style:family="text">
      <style:text-properties fo:font-family="Consolas" style:font-family-generic="modern" style:font-pitch="fixed" officeooo:rsid="001de9d3"/>
    </style:style>
    <style:style style:name="T16" style:family="text">
      <style:text-properties officeooo:rsid="00283c9f"/>
    </style:style>
    <style:style style:name="T17" style:family="text">
      <style:text-properties officeooo:rsid="002a68d9"/>
    </style:style>
    <style:style style:name="T18" style:family="text">
      <style:text-properties fo:font-family="Consolas" style:font-family-generic="modern" style:font-pitch="fixed"/>
    </style:style>
    <style:style style:name="T19" style:family="text">
      <style:text-properties officeooo:rsid="002c2ce1"/>
    </style:style>
    <style:style style:name="T20" style:family="text">
      <style:text-properties officeooo:rsid="002e7f75"/>
    </style:style>
    <style:style style:name="T21" style:family="text">
      <style:text-properties officeooo:rsid="00343aab"/>
    </style:style>
    <style:style style:name="T22" style:family="text">
      <style:text-properties officeooo:rsid="003c62e7"/>
    </style:style>
    <style:style style:name="T23" style:family="text">
      <style:text-properties officeooo:rsid="003e3a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KING Bsides-Vancouver-2018</text:p>
      <text:h text:style-name="P2" text:outline-level="1">1. OBIETTIVO</text:h>
      <text:p text:style-name="P3">Simulare un vero e proprio pentesting su una BlackBox, senza informazioni preliminari. Trovare i modi possibili per diventare root.</text:p>
      <text:h text:style-name="P2" text:outline-level="1">2. CONFIGURAZIONE LABORATORIO</text:h>
      <text:p text:style-name="P3">Creare un laboratorio per testare la blackbox in ambiente isolato e sicuro preparando tre macchine virtuali:</text:p>
      <text:list text:style-name="L1">
        <text:list-item>
          <text:p text:style-name="P4">KALI: La macchina attaccante</text:p>
        </text:list-item>
        <text:list-item>
          <text:p text:style-name="P5">Bsides-Vancouver-2018: <text:span text:style-name="T1">macchina vittima</text:span></text:p>
        </text:list-item>
        <text:list-item>
          <text:p text:style-name="P4">PfSense: Router</text:p>
        </text:list-item>
      </text:list>
      <text:p text:style-name="P6">Impostare due interfacce della PfSense la rete WAN su rete NAT e la rete LAN <text:span text:style-name="T2">(192.168.10.0/24) </text:span>su rete interna chiamata kalinet. Configurare le altre macchine <text:span text:style-name="T2">in rete interna kalinet e attivare dal router-firewall il servizio DHCP su rete LAN, in questo modo le due macchine saranno collegate e riceveranno un indirizzo IP.<text:line-break/>Per poter iniziare l’attacco è necessario scoprire l’IP assegnato </text:span><text:span text:style-name="T3">al target</text:span><text:span text:style-name="T2"> tramite nma</text:span><text:span text:style-name="T4">p</text:span></text:p>
      <text:p text:style-name="P7"><draw:frame draw:style-name="fr1" draw:name="Immagine1" text:anchor-type="paragraph" svg:x="0.711cm" svg:y="0.145cm" svg:width="14.099cm" svg:height="5.652cm" draw:z-index="0"><draw:image xlink:href="Pictures/100000010000029A0000010BC376F70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all’immagine nmap ha trovato 3 indirizzi attivi, <text:span text:style-name="T5">per</text:span><text:span text:style-name="T6"> ri</text:span><text:span text:style-name="T5">uscire</text:span><text:span text:style-name="T6"> a determinare </text:span><text:span text:style-name="T5">l’IP del target</text:span><text:span text:style-name="T6"> </text:span><text:span text:style-name="T5">usare</text:span><text:span text:style-name="T6"> </text:span><text:span text:style-name="T5">il</text:span><text:span text:style-name="T6"> comando </text:span><text:span text:style-name="T7">ip a,</text:span><text:span text:style-name="T8"> </text:span><text:span text:style-name="T9">per escludere la Kali.</text:span></text:p>
      <table:table table:name="Tabella1" table:style-name="Tabella1" table:template-name="Box List Blue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8">VM</text:p>
          </table:table-cell>
          <table:table-cell table:style-name="Tabella1.A1" office:value-type="string">
            <text:p text:style-name="P8">IP</text:p>
          </table:table-cell>
        </table:table-row>
        <table:table-row>
          <table:table-cell table:style-name="Tabella1.A2" office:value-type="string">
            <text:p text:style-name="P9">Kali</text:p>
          </table:table-cell>
          <table:table-cell table:style-name="Tabella1.B2" office:value-type="string">
            <text:p text:style-name="P9">192.168.10.10/24</text:p>
          </table:table-cell>
        </table:table-row>
        <table:table-row>
          <table:table-cell table:style-name="Tabella1.A3" office:value-type="string">
            <text:p text:style-name="P10">Bsides-Vancouver-2018</text:p>
          </table:table-cell>
          <table:table-cell table:style-name="Tabella1.B3" office:value-type="string">
            <text:p text:style-name="P9">192.168.10.13/24</text:p>
            <text:p text:style-name="P9">192.168.10.14/24</text:p>
          </table:table-cell>
        </table:table-row>
        <table:table-row>
          <table:table-cell table:style-name="Tabella1.A4" office:value-type="string">
            <text:p text:style-name="P11">PfSense</text:p>
          </table:table-cell>
          <table:table-cell table:style-name="Tabella1.B4" office:value-type="string">
            <text:p text:style-name="P11">192.168.10.1</text:p>
          </table:table-cell>
        </table:table-row>
      </table:table>
      <text:h text:style-name="P12" text:outline-level="1" text:is-list-header="true"><text:soft-page-break/>PROCEDURA</text:h>
      <text:h text:style-name="P13" text:outline-level="2">3.1 ATTACCO PORTA 2<text:span text:style-name="T10">2</text:span></text:h>
      <text:p text:style-name="P14"><text:span text:style-name="T11">La prime fasi di un attacco riguardano la raccolta delle informazioni </text:span><text:span text:style-name="T4">per conoscere il</text:span><text:span text:style-name="T11"> perimetro d’attacco e sapere quali vulnerabilità sfruttare. Tramite nmap si fa una scansione della macchina. target per rilevare: le porte aperte, i servizi attivi e il sistema operativo.</text:span></text:p>
      <text:p text:style-name="P15"><draw:frame draw:style-name="fr2" draw:name="Immagine2" text:anchor-type="char" svg:x="-0.018cm" svg:y="-0.176cm" svg:width="17cm" svg:height="7.267cm" draw:z-index="1"><draw:image xlink:href="Pictures/100000010000040C000001BBEF9C8170.png" xlink:type="simple" xlink:show="embed" xlink:actuate="onLoad" draw:mime-type="image/png"/></draw:frame>Lo scanner ha rivelato 3 porte aperte. <text:span text:style-name="T12">Due di queste hanno in ascolto servizi considerati oggi poco sicuri per la mancanza di crittografia e di certificazioni basate su chiavi.</text:span></text:p>
      <text:p text:style-name="P16">Dopo aver tentato l’accesso dalla porta 21 <text:span text:style-name="T5">il servizio chiedeva il nome utente. Quindi ho usato h</text:span><draw:frame draw:style-name="fr2" draw:name="Immagine3" text:anchor-type="char" svg:x="0.212cm" svg:y="1.501cm" svg:width="17cm" svg:height="7.4cm" draw:z-index="2"><draw:image xlink:href="Pictures/10000001000004B60000020DB8C771E2.png" xlink:type="simple" xlink:show="embed" xlink:actuate="onLoad" draw:mime-type="image/png"/></draw:frame><text:span text:style-name="T5">ydra per craccare utente e password.</text:span></text:p>
      <text:p text:style-name="P17">Da questa ricerca ho capito che il servizio prevede l’accesso <text:span text:style-name="T13">senza password</text:span>.</text:p>
      <text:p text:style-name="P17"><draw:frame draw:style-name="fr2" draw:name="Immagine4" text:anchor-type="char" svg:x="0.051cm" svg:y="0.123cm" svg:width="7.62cm" svg:height="2.582cm" draw:z-index="3"><draw:image xlink:href="Pictures/10000001000001680000007A3BEFA63B.png" xlink:type="simple" xlink:show="embed" xlink:actuate="onLoad" draw:mime-type="image/png"/></draw:frame></text:p>
      <text:p text:style-name="P17"/>
      <text:p text:style-name="P15"/>
      <text:p text:style-name="P18"><text:soft-page-break/><text:s/></text:p>
      <text:p text:style-name="P19"><draw:frame draw:style-name="fr1" draw:name="Immagine5" text:anchor-type="paragraph" svg:x="0.171cm" svg:y="0.714cm" svg:width="5.44cm" svg:height="2.582cm" draw:z-index="4"><draw:image xlink:href="Pictures/10000001000001010000007AF4276DE2.png" xlink:type="simple" xlink:show="embed" xlink:actuate="onLoad" draw:mime-type="image/png"/></draw:frame><text:span text:style-name="T14">All’interno ho trovato dei file contenenti dei nomi utenti.</text:span><text:span text:style-name="T15"/></text:p>
      <text:p text:style-name="P20"><text:s text:c="4"/></text:p>
      <text:p text:style-name="P20">Ho salvato i nomi nella cartella vancouver_username</text:p>
      <text:p text:style-name="P21"/>
      <text:p text:style-name="P21"/>
      <text:p text:style-name="P21">Ho capito potessero servire per accedere tramite servizio SSH, e ho usato hydra per cercare le <draw:frame draw:style-name="fr2" draw:name="Immagine6" text:anchor-type="char" svg:x="0.159cm" svg:y="1.295cm" svg:width="17cm" svg:height="3.318cm" draw:z-index="5"><draw:image xlink:href="Pictures/100000010000034D000000A5548C0F29.png" xlink:type="simple" xlink:show="embed" xlink:actuate="onLoad" draw:mime-type="image/png"/></draw:frame>password.</text:p>
      <text:p text:style-name="P22"><text:span text:style-name="T13">Dopo un po' di prove ho capito </text:span><text:span text:style-name="T4">chr </text:span><text:span text:style-name="T13">dovevo cercare quale user avesse </text:span><text:span text:style-name="T16">abilitato </text:span><text:span text:style-name="T13"><text:s/>l’autenticazione tramite password</text:span></text:p>
      <text:p text:style-name="P22"><draw:frame draw:style-name="fr1" draw:name="Immagine7" text:anchor-type="paragraph" svg:x="0.259cm" svg:y="-0.046cm" svg:width="13.483cm" svg:height="12.171cm" draw:z-index="6"><draw:image xlink:href="Pictures/100000010000027D0000023FADD7219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3">Individuato il target con la password abilitata, ho usato di nuovo hydra per scoprire la password.</text:p>
      <text:p text:style-name="P21"><draw:frame draw:style-name="fr2" draw:name="Immagine8" text:anchor-type="char" svg:x="0.005cm" svg:y="-0.106cm" svg:width="14.734cm" svg:height="4.487cm" draw:z-index="7"><draw:image xlink:href="Pictures/10000001000002B8000000D49B3DACA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/text:p>
      <text:p text:style-name="P21"/>
      <text:p text:style-name="P23">Con il nome dell’utente e la <text:span text:style-name="T17">pa</text:span>ssword ho fatto l’accesso via SSH.</text:p>
      <text:p text:style-name="P24"><draw:frame draw:style-name="fr3" draw:name="Immagine9" text:anchor-type="char" svg:width="13.187cm" svg:height="5.969cm" draw:z-index="8"><draw:image xlink:href="Pictures/100000010000026F0000011A5368D94B.png" xlink:type="simple" xlink:show="embed" xlink:actuate="onLoad" draw:mime-type="image/png"/></draw:frame>Dopo aver guardato tra le cartelle e vari tentativi ho usato il comando sudo -l per vedere i privilegi di root dell’utente anne.</text:p>
      <text:p text:style-name="P24"><draw:frame draw:style-name="fr2" draw:name="Immagine10" text:anchor-type="char" svg:x="-0.034cm" svg:y="0.037cm" svg:width="14.459cm" svg:height="4.974cm" draw:z-index="9"><draw:image xlink:href="Pictures/10000001000002AB000000EB0D0CE2D6.png" xlink:type="simple" xlink:show="embed" xlink:actuate="onLoad" draw:mime-type="image/png"/></draw:frame></text:p>
      <text:p text:style-name="P25"><text:tab/><text:tab/><text:tab/><text:tab/><text:tab/><text:tab/><text:tab/><text:tab/><text:tab/><text:tab/><text:tab/><text:tab/><text:tab/><text:tab/><text:tab/></text:p>
      <text:p text:style-name="P25"/>
      <text:p text:style-name="P25">L’utente a cui abbiamo accesso ha tutti i privilegi di root, quindi <text:span text:style-name="T4">usando il comando</text:span> <text:span text:style-name="T18">sudo su</text:span> <text:span text:style-name="T4">si diventa utente root.</text:span></text:p>
      <text:p text:style-name="P25"><text:span text:style-name="T4">Infine </text:span><text:span text:style-name="T19">si entra nella cartella root e si trova il file flag.txt.</text:span></text:p>
      <text:p text:style-name="P25"/>
      <text:h text:style-name="Heading_20_1" text:outline-level="1"><draw:frame draw:style-name="fr4" draw:name="Immagine11" text:anchor-type="paragraph" svg:width="17cm" svg:height="3.898cm" draw:z-index="10"><draw:image xlink:href="Pictures/100000010000041F000000F272732CFE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h>
      <text:h text:style-name="P26" text:outline-level="2">3.2 ATTACCO PORTA 80</text:h>
      <text:p text:style-name="P27">Cercando la pagina del browser si trova la pagina di accesso standard del server apache.</text:p>
      <text:p text:style-name="P27"><draw:frame draw:style-name="fr1" draw:name="Immagine13" text:anchor-type="paragraph" svg:x="-0.453cm" svg:y="0cm" svg:width="15.05cm" svg:height="6.943cm" draw:z-index="11"><draw:image xlink:href="Pictures/10000001000002C700000148E8668F8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8"><draw:frame draw:style-name="fr5" draw:name="Immagine14" text:anchor-type="paragraph" svg:x="-0.199cm" svg:y="1.281cm" svg:width="9.885cm" svg:height="7.816cm" draw:z-index="12"><draw:image xlink:href="Pictures/10000001000001D3000001B35DB05DAA.png" xlink:type="simple" xlink:show="embed" xlink:actuate="onLoad" draw:mime-type="image/png"/></draw:frame>Tramite dirb, un tool di scansione di dyrectory nascoste, ho fatto l’enumerazione del sito web. </text:p>
      <text:p text:style-name="P28"><text:soft-page-break/><text:span text:style-name="T20">La scansione ha rilevato 6 pagine nascoste di cui solo una accessibile.</text:span></text:p>
      <text:p text:style-name="P29"><draw:frame draw:style-name="fr1" draw:name="Immagine15" text:anchor-type="paragraph" svg:x="-0.088cm" svg:y="0cm" svg:width="17cm" svg:height="6.652cm" draw:z-index="13"><draw:image xlink:href="Pictures/10000001000003810000015FF9378D88.png" xlink:type="simple" xlink:show="embed" xlink:actuate="onLoad" draw:mime-type="image/png"/></draw:frame>Questa è una pagina dove l’amministratore vieta l’accesso al link /backup_wordpress</text:p>
      <text:p text:style-name="P29">Ho inserito il percorso nella barra degli indirizzi e ho trovato una vecchia pagina dismessa.</text:p>
      <text:p text:style-name="P30"><draw:frame draw:style-name="fr6" draw:name="Immagine16" text:anchor-type="char" svg:width="17cm" svg:height="9.031cm" draw:z-index="14"><draw:image xlink:href="Pictures/1000000100000780000003FC272DEB79.png" xlink:type="simple" xlink:show="embed" xlink:actuate="onLoad" draw:mime-type="image/png"/></draw:frame>Esplorando la pagina ho trovato:</text:p>
      <text:list text:style-name="L2">
        <text:list-item>
          <text:p text:style-name="P31">Il nome dei 2 amministratori</text:p>
          <text:p text:style-name="P32"/>
          <text:p text:style-name="P32"><text:span text:style-name="T21"><text:tab/></text:span></text:p>
          <text:p text:style-name="P32"/>
        </text:list-item>
      </text:list>
      <text:p text:style-name="P33"><draw:frame draw:style-name="fr2" draw:name="Immagine17" text:anchor-type="char" svg:x="0.3cm" svg:y="-0.086cm" svg:width="16.365cm" svg:height="4.9cm" draw:z-index="15"><draw:image xlink:href="Pictures/100000010000033C000000F83BCA2A1C.png" xlink:type="simple" xlink:show="embed" xlink:actuate="onLoad" draw:mime-type="image/png"/></draw:frame><draw:frame draw:style-name="fr2" draw:name="Immagine18" text:anchor-type="char" svg:x="0.847cm" svg:y="4.613cm" svg:width="17cm" svg:height="4.184cm" draw:z-index="16"><draw:image xlink:href="Pictures/100000010000034D000000D0A36C275F.png" xlink:type="simple" xlink:show="embed" xlink:actuate="onLoad" draw:mime-type="image/png"/></draw:frame><text:soft-page-break/></text:p>
      <text:p text:style-name="P33"/>
      <text:list text:continue-numbering="true" text:style-name="L2">
        <text:list-item>
          <text:p text:style-name="P34">la pagina di login</text:p>
        </text:list-item>
      </text:list>
      <text:p text:style-name="P33"><draw:frame draw:style-name="fr2" draw:name="Immagine12" text:anchor-type="char" svg:x="0.106cm" svg:y="1.097cm" svg:width="17cm" svg:height="9.031cm" draw:z-index="20"><draw:image xlink:href="Pictures/1000000100000780000003FCBDA63954.png" xlink:type="simple" xlink:show="embed" xlink:actuate="onLoad" draw:mime-type="image/png"/></draw:frame></text:p>
      <text:p text:style-name="P33"/>
      <text:p text:style-name="P33"><text:span text:style-name="T22">Ho usato wpscan per individuare la password</text:span><text:tab/><text:tab/><text:tab/><text:tab/><text:tab/><text:tab/><text:tab/></text:p>
      <text:p text:style-name="P35">wpscan ha confermato vulnerabilità alla brute force.</text:p>
      <text:p text:style-name="P36"><draw:frame draw:style-name="fr7" draw:name="Immagine22" text:anchor-type="paragraph" svg:width="17cm" svg:height="4.143cm" draw:z-index="17"><draw:image xlink:href="Pictures/10000001000005D90000016D41AAC42F.png" xlink:type="simple" xlink:show="embed" xlink:actuate="onLoad" draw:mime-type="image/png"/></draw:frame><text:soft-page-break/>WPScan ha rilevato la password di john</text:p>
      <text:p text:style-name="P36"><draw:frame draw:style-name="fr2" draw:name="Immagine23" text:anchor-type="char" svg:x="-0.007cm" svg:y="-0.212cm" svg:width="10.372cm" svg:height="1.588cm" draw:z-index="18"><draw:image xlink:href="Pictures/10000001000001EA0000004B031EE10A.png" xlink:type="simple" xlink:show="embed" xlink:actuate="onLoad" draw:mime-type="image/png"/></draw:frame><text:s/></text:p>
      <text:p text:style-name="P36"/>
      <text:p text:style-name="P37"/>
      <text:p text:style-name="P37"><text:tab/><text:tab/><text:tab/><text:tab/><text:tab/><text:tab/><text:tab/><text:tab/><text:tab/><text:tab/><text:tab/><text:tab/><text:tab/><text:tab/></text:p>
      <text:p text:style-name="P38">Con la password sono riuscita a fare l’accesso</text:p>
      <text:p text:style-name="P35"><draw:frame draw:style-name="fr1" draw:name="Immagine24" text:anchor-type="paragraph" svg:x="0.035cm" svg:y="0.176cm" svg:width="17cm" svg:height="13.137cm" draw:z-index="19"><draw:image xlink:href="Pictures/100000010000043F00000348A9B46482.png" xlink:type="simple" xlink:show="embed" xlink:actuate="onLoad" draw:mime-type="image/png"/></draw:frame><text:soft-page-break/><text:span text:style-name="T23">Ho trovato li script in nella pagin edit in appearance, dove ho caricato una reverse shell sulla pagina i</text:span><draw:frame draw:style-name="fr2" draw:name="Immagine19" text:anchor-type="char" svg:x="0.088cm" svg:y="15.66cm" svg:width="17cm" svg:height="9.031cm" draw:z-index="21"><draw:image xlink:href="Pictures/1000000100000780000003FC8B51E2D4.png" xlink:type="simple" xlink:show="embed" xlink:actuate="onLoad" draw:mime-type="image/png"/></draw:frame><text:span text:style-name="T23">niziale del sito.</text:span></text:p>
      <text:p text:style-name="P35"/>
      <text:p text:style-name="P35"><text:soft-page-break/><text:span text:style-name="T23">Ho aperto un server sulla kali tramite netcat, per ricevere la connessione dal target.</text:span><text:tab/><text:tab/><text:tab/><text:tab/><text:tab/><text:tab/><text:tab/><text:tab/><text:tab/><text:tab/><text:tab/><text:tab/><text:tab/></text:p>
      <text:p text:style-name="P35"><draw:frame draw:style-name="fr2" draw:name="Immagine20" text:anchor-type="char" svg:x="-0.048cm" svg:y="-0.254cm" svg:width="17cm" svg:height="3.501cm" draw:z-index="22"><draw:image xlink:href="Pictures/100000010000039A000000BE77E9BD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it" number:country="IT">
      <number:number number:min-integer-digits="1"/>
    </number:number-style>
    <number:text-style style:name="N20100" number:language="it" number:country="IT">
      <number:text-content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color="#000000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color="#000000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color="#000000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color="#000000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3e3ab5" officeooo:paragraph-rsid="003e3a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7T20:40:51.290315200</meta:creation-date>
    <dc:date>2026-07-20T16:28:29.869523400</dc:date>
    <meta:editing-duration>PT2H55M37S</meta:editing-duration>
    <meta:editing-cycles>7</meta:editing-cycles>
    <meta:generator>LibreOffice/26.2.4.2$Windows_X86_64 LibreOffice_project/0229ac93fcf0d7cbc6376066c6f35021cef002dc</meta:generator>
    <meta:print-date>2026-07-20T08:47:16.903289700</meta:print-date>
    <meta:printed-by>File PDF</meta:printed-by>
    <meta:document-statistic meta:table-count="1" meta:image-count="23" meta:object-count="0" meta:page-count="10" meta:paragraph-count="61" meta:word-count="550" meta:character-count="3648" meta:non-whitespace-character-count="2953"/>
  </office:meta>
</office:document-meta>
</file>