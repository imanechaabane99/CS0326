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A000000EB085705BD.png" manifest:media-type="image/png"/>
  <manifest:file-entry manifest:full-path="Pictures/1000000100000283000001425175C1B6.png" manifest:media-type="image/png"/>
  <manifest:file-entry manifest:full-path="Pictures/100000010000015C0000003EDEE18118.png" manifest:media-type="image/png"/>
  <manifest:file-entry manifest:full-path="Pictures/10000000000002B2000001130138F560.png" manifest:media-type="image/png"/>
  <manifest:file-entry manifest:full-path="Pictures/1000000100000458000001B00B7305F8.png" manifest:media-type="image/png"/>
  <manifest:file-entry manifest:full-path="Pictures/10000001000002B7000000FC5087D7A1.png" manifest:media-type="image/png"/>
  <manifest:file-entry manifest:full-path="Pictures/10000001000001010000002FF9B34F1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3c428" officeooo:paragraph-rsid="0013c428"/>
    </style:style>
    <style:style style:name="P2" style:family="paragraph" style:parent-style-name="Heading_20_1">
      <style:text-properties officeooo:rsid="00147796" officeooo:paragraph-rsid="00147796"/>
    </style:style>
    <style:style style:name="P3" style:family="paragraph" style:parent-style-name="Text_20_body">
      <style:text-properties officeooo:rsid="00147796" officeooo:paragraph-rsid="00147796"/>
    </style:style>
    <style:style style:name="P4" style:family="paragraph" style:parent-style-name="Text_20_body" style:list-style-name="L1">
      <style:text-properties style:font-name="Liberation Serif" officeooo:paragraph-rsid="00147796"/>
    </style:style>
    <style:style style:name="P5" style:family="paragraph" style:parent-style-name="Text_20_body">
      <style:text-properties style:font-name="Liberation Serif" officeooo:rsid="00147796" officeooo:paragraph-rsid="00147796"/>
    </style:style>
    <style:style style:name="P6" style:family="paragraph" style:parent-style-name="Heading_20_1">
      <style:text-properties officeooo:rsid="0015c7cf" officeooo:paragraph-rsid="0015c7cf"/>
    </style:style>
    <style:style style:name="P7" style:family="paragraph" style:parent-style-name="Text_20_body">
      <style:text-properties officeooo:rsid="00206dde" officeooo:paragraph-rsid="00206dde"/>
    </style:style>
    <style:style style:name="P8" style:family="paragraph" style:parent-style-name="Text_20_body">
      <style:text-properties officeooo:paragraph-rsid="0015c7cf"/>
    </style:style>
    <style:style style:name="P9" style:family="paragraph" style:parent-style-name="Text_20_body">
      <style:text-properties officeooo:rsid="0015c7cf" officeooo:paragraph-rsid="0015c7cf"/>
    </style:style>
    <style:style style:name="P10" style:family="paragraph" style:parent-style-name="Text_20_body">
      <style:text-properties style:font-name="Liberation Serif" officeooo:rsid="0016ac84" officeooo:paragraph-rsid="0016ac84"/>
    </style:style>
    <style:style style:name="P11" style:family="paragraph" style:parent-style-name="Text_20_body">
      <style:text-properties style:font-name="Consolas" officeooo:rsid="0016ac84" officeooo:paragraph-rsid="0016ac84"/>
    </style:style>
    <style:style style:name="P12" style:family="paragraph" style:parent-style-name="Text_20_body">
      <style:text-properties style:font-name="Liberation Serif" officeooo:rsid="00177e12" officeooo:paragraph-rsid="00177e12"/>
    </style:style>
    <style:style style:name="P13" style:family="paragraph" style:parent-style-name="Text_20_body" style:list-style-name="L2">
      <style:text-properties style:font-name="Liberation Serif" officeooo:rsid="00177e12" officeooo:paragraph-rsid="00177e12"/>
    </style:style>
    <style:style style:name="P14" style:family="paragraph" style:parent-style-name="Text_20_body" style:list-style-name="L2">
      <style:text-properties style:font-name="Liberation Serif" officeooo:rsid="0018a306" officeooo:paragraph-rsid="0018a306"/>
    </style:style>
    <style:style style:name="P15" style:family="paragraph" style:parent-style-name="Text_20_body">
      <style:text-properties style:font-name="Liberation Serif" officeooo:rsid="0018a306" officeooo:paragraph-rsid="001d5375"/>
    </style:style>
    <style:style style:name="P16" style:family="paragraph" style:parent-style-name="Text_20_body">
      <style:text-properties style:font-name="Liberation Serif" officeooo:rsid="001ba478" officeooo:paragraph-rsid="001d5375"/>
    </style:style>
    <style:style style:name="P17" style:family="paragraph" style:parent-style-name="Text_20_body">
      <style:text-properties style:font-name="Liberation Serif" officeooo:rsid="001ba478" officeooo:paragraph-rsid="00218e72"/>
    </style:style>
    <style:style style:name="P18" style:family="paragraph" style:parent-style-name="Heading_20_2">
      <style:text-properties officeooo:paragraph-rsid="001f52e3"/>
    </style:style>
    <style:style style:name="P19" style:family="paragraph" style:parent-style-name="Text_20_body">
      <style:text-properties style:font-name="Liberation Serif" officeooo:rsid="00206dde" officeooo:paragraph-rsid="00206dde"/>
    </style:style>
    <style:style style:name="P20" style:family="paragraph" style:parent-style-name="Text_20_body">
      <style:text-properties style:font-name="Liberation Serif" officeooo:rsid="00206dde" officeooo:paragraph-rsid="00256c42"/>
    </style:style>
    <style:style style:name="P21" style:family="paragraph" style:parent-style-name="Heading_20_1">
      <style:text-properties officeooo:paragraph-rsid="00256c42"/>
    </style:style>
    <style:style style:name="P22" style:family="paragraph" style:parent-style-name="Text_20_body">
      <style:text-properties officeooo:rsid="00218e72" officeooo:paragraph-rsid="00218e72"/>
    </style:style>
    <style:style style:name="P23" style:family="paragraph" style:parent-style-name="Text_20_body">
      <style:text-properties officeooo:rsid="0022ffed" officeooo:paragraph-rsid="0022ffed"/>
    </style:style>
    <style:style style:name="P24" style:family="paragraph" style:parent-style-name="Text_20_body" style:list-style-name="L3">
      <style:text-properties officeooo:rsid="0024cb98" officeooo:paragraph-rsid="0024cb98"/>
    </style:style>
    <style:style style:name="P25" style:family="paragraph" style:parent-style-name="Text_20_body" style:list-style-name="L4"/>
    <style:style style:name="T1" style:family="text">
      <style:text-properties officeooo:rsid="0015c7cf"/>
    </style:style>
    <style:style style:name="T2" style:family="text">
      <style:text-properties officeooo:rsid="00147796"/>
    </style:style>
    <style:style style:name="T3" style:family="text">
      <style:text-properties officeooo:rsid="001bffba"/>
    </style:style>
    <style:style style:name="T4" style:family="text">
      <style:text-properties officeooo:rsid="0016ac84"/>
    </style:style>
    <style:style style:name="T5" style:family="text">
      <style:text-properties officeooo:rsid="00206dde"/>
    </style:style>
    <style:style style:name="T6" style:family="text">
      <style:text-properties officeooo:rsid="001bb60c"/>
    </style:style>
    <style:style style:name="T7" style:family="text">
      <style:text-properties style:font-name="Consolas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6ac84"/>
    </style:style>
    <style:style style:name="T10" style:family="text">
      <style:text-properties officeooo:rsid="0018a306"/>
    </style:style>
    <style:style style:name="T11" style:family="text">
      <style:text-properties officeooo:rsid="001a75a7"/>
    </style:style>
    <style:style style:name="T12" style:family="text">
      <style:text-properties officeooo:rsid="001d5375"/>
    </style:style>
    <style:style style:name="T13" style:family="text">
      <style:text-properties officeooo:rsid="001ba478"/>
    </style:style>
    <style:style style:name="T14" style:family="text">
      <style:text-properties officeooo:rsid="00218e72"/>
    </style:style>
    <style:style style:name="T15" style:family="text">
      <style:text-properties officeooo:rsid="001f52e3"/>
    </style:style>
    <style:style style:name="T16" style:family="text">
      <style:text-properties officeooo:rsid="00256c42"/>
    </style:style>
    <style:style style:name="T17" style:family="text">
      <style:text-properties officeooo:rsid="0024cb98"/>
    </style:style>
    <style:style style:name="T18" style:family="text">
      <style:text-properties officeooo:rsid="0022ff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ENTICATION CRACKING CON HYDRA</text:p>
      <text:h text:style-name="P2" text:outline-level="1"><text:span text:style-name="T1">1. </text:span>OBIETTIVO</text:h>
      <text:p text:style-name="P3">L’esercizio si svilupperà in due fasi:</text:p>
      <text:list text:style-name="L1">
        <text:list-item>
          <text:p text:style-name="P4"><text:span text:style-name="T2">Una prima fase dove insieme vedremo l’abilitazione di un servizio SSH e la relativa sessione di cracking dell’autenticazione con Hydra.</text:span></text:p>
        </text:list-item>
        <text:list-item>
          <text:p text:style-name="P4"><text:span text:style-name="T2">Una seconda fase dove sarete liberi di configurare e craccare un qualsiasi servizio di rete tra quelli disponibili, ad esempio ftp, rdp, telnet, autenticazione HTTP</text:span></text:p>
        </text:list-item>
      </text:list>
      <text:p text:style-name="P5">Con lo scopo di fare pratica con questo strumento di autentication cracking e consolidare le conoscenze tramite la sua configurazione.</text:p>
      <text:h text:style-name="P6" text:outline-level="1">2. PROCEDURA:<text:span text:style-name="T3">configurazione e cracking SSH</text:span></text:h>
      <text:h text:style-name="Heading_20_2" text:outline-level="2">2.1 PRIMA FASE</text:h>
      <text:p text:style-name="P7">Questa parte dell’esercizio richiede l’attivazione del servizio SSH e la sua configurazione per poi craccare l’autenticazione tramite Hydra.</text:p>
      <text:p text:style-name="P8"><text:span text:style-name="T4">1. </text:span><text:span text:style-name="T5">P</text:span><text:span text:style-name="T1">er iniziare l’esercizio è richiesto di aggiungere un utente con corrispettiva password all’interno della macchina Kali tramite comando adduser su linea di comando.</text:span></text:p>
      <text:p text:style-name="P9"><draw:frame draw:style-name="fr1" draw:name="Immagine1" text:anchor-type="char" svg:x="-1.251cm" svg:y="0.176cm" svg:width="13.61cm" svg:height="6.816cm" draw:z-index="0"><draw:image xlink:href="Pictures/1000000100000283000001425175C1B6.png" xlink:type="simple" xlink:show="embed" xlink:actuate="onLoad" draw:mime-type="image/png"/></draw:frame>UTENTE:test_user</text:p>
      <text:p text:style-name="P9">PASSWORD: testpass</text:p>
      <text:p text:style-name="P9">Completare solo l’input passworda lasciare vuoti gli altri campi.</text:p>
      <text:p text:style-name="P9"/>
      <text:p text:style-name="P9"/>
      <text:p text:style-name="P9"/>
      <text:p text:style-name="P9"/>
      <text:p text:style-name="P9"/>
      <text:p text:style-name="P9"><text:span text:style-name="T4">2. </text:span>È necessario per il completamento dell’esercizio attivare il protocollo ssh, che permette il collegamento crittografato e sicuro in remoto tra un client e un server. Si attiva sempre da linea di comando<draw:frame draw:style-name="fr1" draw:name="Immagine2" text:anchor-type="char" svg:x="11.061cm" svg:y="-0.106cm" svg:width="7.366cm" svg:height="1.312cm" draw:z-index="1"><draw:image xlink:href="Pictures/100000010000015C0000003EDEE18118.png" xlink:type="simple" xlink:show="embed" xlink:actuate="onLoad" draw:mime-type="image/png"/></draw:frame>. Si può accedere al file di config<text:span text:style-name="T6">ur</text:span>azione tramite comando: <text:line-break/><text:soft-page-break/><text:span text:style-name="T7">nano /etc/ssh/sshd_config </text:span><text:span text:style-name="T8">dal quale si può: cambiare porta e IP, </text:span><text:span text:style-name="T9">definire le regole crittografiche e le chiavi accettate, impostare il sistema di logging e determinare il metodo di autenticazione degli utenti. Per questo laboratorio si possono lasciare i campi invariati.</text:span></text:p>
      <text:p text:style-name="P10">3. Testare la connessione in ssh tramite comando <text:span text:style-name="T7">ssh </text:span><text:a xlink:type="simple" xlink:href="mailto:test_user@IP_MACCHINA" text:style-name="Internet_20_link" text:visited-style-name="Visited_20_Internet_20_Link"><text:span text:style-name="T7">test_user@IP_MACCHINA</text:span></text:a></text:p>
      <text:p text:style-name="P11"><draw:frame draw:style-name="fr1" draw:name="Immagine3" text:anchor-type="char" svg:x="-0.176cm" svg:y="-0.9cm" svg:width="17cm" svg:height="6.602cm" draw:z-index="2"><draw:image xlink:href="Pictures/1000000100000458000001B00B7305F8.png" xlink:type="simple" xlink:show="embed" xlink:actuate="onLoad" draw:mime-type="image/png"/></draw:frame></text:p>
      <text:p text:style-name="P12">E fare exit per uscire dalla sessione ssh.</text:p>
      <text:p text:style-name="P12">5. Scaricare una wordlist di username e password tramite comando:<text:line-break/><text:span text:style-name="T7">sudo apt install seclists</text:span></text:p>
      <text:p text:style-name="P12">6. L’utilizzo delle seclists complete richiederebbe dei giorni, quindi sono state create due liste:</text:p>
      <text:list text:style-name="L2">
        <text:list-item>
          <text:p text:style-name="P13">lista_password: <text:span text:style-name="T10">Che contiene testpass e 19 password pres</text:span><text:span text:style-name="T11">e</text:span><text:span text:style-name="T10"> dal file 10k-most-common.txt</text:span></text:p>
        </text:list-item>
        <text:list-item>
          <text:p text:style-name="P14">lista_users: Contiene test_user e <text:span text:style-name="T12">1</text:span>9 username pres<text:span text:style-name="T12">i</text:span> dal file xato-net-10-million-usernames.txt nella cartella seclists.</text:p>
        </text:list-item>
      </text:list>
      <text:p text:style-name="P15">7. <text:span text:style-name="T13">Segu</text:span><text:span text:style-name="T14">e</text:span><text:span text:style-name="T13">ndo la configurazione di Hydra consigliata dalla slide il comando restituisce errore,</text:span></text:p>
      <text:p text:style-name="P16"><draw:frame draw:style-name="fr1" draw:name="Immagine5" text:anchor-type="char" svg:x="0.704cm" svg:y="0.413cm" svg:width="14.605cm" svg:height="5.821cm" draw:z-index="3"><draw:image xlink:href="Pictures/10000000000002B2000001130138F560.png" xlink:type="simple" xlink:show="embed" xlink:actuate="onLoad" draw:mime-type="image/png"/></draw:frame></text:p>
      <text:p text:style-name="P17">perchè ha una tolleranza minore di 3 tentativi di connessione alla volta infatti cambiando il parametro a 1 o 2 il tool riesce a trovare utente e password.</text:p>
      <text:h text:style-name="P18" text:outline-level="2"><draw:frame draw:style-name="fr2" draw:name="Immagine4" text:anchor-type="paragraph" svg:x="0.612cm" svg:y="-0.243cm" svg:width="14.542cm" svg:height="5.398cm" draw:z-index="4"><draw:image xlink:href="Pictures/10000001000002B7000000FC5087D7A1.png" xlink:type="simple" xlink:show="embed" xlink:actuate="onLoad" draw:mime-type="image/png"/></draw:frame><text:soft-page-break/><text:tab/><text:tab/><text:tab/><text:tab/><text:tab/><text:tab/><text:tab/><text:tab/><text:tab/><text:tab/><text:tab/><text:tab/></text:h>
      <text:h text:style-name="P18" text:outline-level="2"><text:span text:style-name="T15">2.2 SECONDA FASE: </text:span><text:span text:style-name="T5">configurazione e cracking FTP</text:span><text:tab/><text:tab/></text:h>
      <text:p text:style-name="P7">Per questa seconda fase è richiesto di scegliere un servizio da configurare e craccare. l’autenticazione tramite Hydra:</text:p>
      <text:p text:style-name="P7">1. Se si sceglie FTP installare il servizio tramite comando: <text:span text:style-name="T7">sudo apt install vsftpd.</text:span></text:p>
      <text:p text:style-name="P7">2. Avviare il servizio FTP: <draw:frame draw:style-name="fr1" draw:name="Immagine6" text:anchor-type="char" svg:x="6.115cm" svg:y="-0.141cm" svg:width="5.44cm" svg:height="0.995cm" draw:z-index="5"><draw:image xlink:href="Pictures/10000001000001010000002FF9B34F10.png" xlink:type="simple" xlink:show="embed" xlink:actuate="onLoad" draw:mime-type="image/png"/></draw:frame></text:p>
      <text:p text:style-name="P19"/>
      <text:p text:style-name="P20">3. Attivare il cracking tramite hydra con <text:span text:style-name="T16">il comando scitto sulla slide ha funzionato, poiché il servizio non presenta Rate Limiting.<text:tab/></text:span></text:p>
      <text:h text:style-name="P21" text:outline-level="1" text:is-list-header="true"><draw:frame draw:style-name="fr2" draw:name="Immagine7" text:anchor-type="paragraph" svg:x="0.88cm" svg:y="0.295cm" svg:width="14.393cm" svg:height="5.186cm" draw:z-index="6"><draw:image xlink:href="Pictures/100000010000032A000000EB085705BD.png" xlink:type="simple" xlink:show="embed" xlink:actuate="onLoad" draw:mime-type="image/png"/></draw:frame></text:h>
      <text:h text:style-name="P21" text:outline-level="1"><text:span text:style-name="T14">4. CONCLUSIONE</text:span><text:tab/><text:tab/></text:h>
      <text:p text:style-name="P22">L’attività di laboratorio ha permesso di provare attivamente uno strument<text:span text:style-name="T17">o</text:span> di cracking basato sui dizionari, ossia una collezione di password e utenti rubate da <text:span text:style-name="T18">persone </text:span>reali.</text:p>
      <text:p text:style-name="P23">Hydra è uno degli strumenti più utilizzat<text:span text:style-name="T17">i</text:span> in ambito cybersecurity per quanto riguarda il cracking online per la sua velocità e per la sua versatilità, infatti supporta diversi protocolli. In questo esperimento lo strumento è stato testato sui protocolli FTP e SSH. L’FTP è un protocollo ad oggi considerato poco sicuro e sconsigliato, mentre SSH gode della crittografia e supporta l’autenticazione tramite certificati, ma Hydra è riuscito a craccare l’autenticazione di entrambi i <text:soft-page-break/>servizi dimostrando l’importanza di scegliere una buona password. <text:line-break/><text:span text:style-name="T17">È raccomandato per gli utenti:</text:span></text:p>
      <text:list text:style-name="L3">
        <text:list-item>
          <text:p text:style-name="P24">Scegliere password lunghe e complesse, perché richiedono enorme potenza di calcolo e di tempo rendendo impossibile la violazione delle credenziali. Il NIST consiglia l’uso di Passphrase lunghe, che sono facili da ricordare e difficili da scoprire. </text:p>
        </text:list-item>
        <text:list-item>
          <text:p text:style-name="P24">Attivare l’autenticazione a due fattori (MFA/2MFA), che limita i danni in caso di furto di credenziali.</text:p>
        </text:list-item>
      </text:list>
      <text:list text:style-name="L4">
        <text:list-header>
          <text:p text:style-name="P25"/>
        </text:list-header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7T10:26:39.102119800</meta:creation-date>
    <dc:date>2026-07-17T15:06:14.318359600</dc:date>
    <meta:editing-duration>PT45M29S</meta:editing-duration>
    <meta:editing-cycles>4</meta:editing-cycles>
    <meta:generator>LibreOffice/26.2.4.2$Windows_X86_64 LibreOffice_project/0229ac93fcf0d7cbc6376066c6f35021cef002dc</meta:generator>
    <meta:document-statistic meta:table-count="0" meta:image-count="7" meta:object-count="0" meta:page-count="4" meta:paragraph-count="34" meta:word-count="569" meta:character-count="3829" meta:non-whitespace-character-count="3278"/>
  </office:meta>
</office:document-meta>
</file>